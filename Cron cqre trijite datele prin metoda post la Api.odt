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on cqre trijite datele prin metoda post la Api, datele se trimit cate 100 un chunk apoi se evita duplicarile, apoi se fac agregatele pe organizatie cu rolur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umitru Mihail Alin</meta:initial-creator>
    <dc:creator>Dumitru Mihail Alin</dc:creator>
    <meta:creation-date>2026-06-27T07:29:00Z</meta:creation-date>
    <dc:date>2026-06-27T07:29:00Z</dc:date>
    <meta:template xlink:href="Normal" xlink:type="simple"/>
    <meta:editing-cycles>1</meta:editing-cycles>
    <meta:editing-duration>PT0S</meta:editing-duration>
    <meta:document-statistic meta:page-count="1" meta:paragraph-count="1" meta:word-count="23" meta:character-count="159" meta:row-count="1" meta:non-whitespace-character-count="137"/>
  </office:meta>
</office:document-meta>
</file>